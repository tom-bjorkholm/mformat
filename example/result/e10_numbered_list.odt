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Numbered list example</text:h>
      <text:list text:style-name="numbered-list">
        <text:list-item>
          <text:p>This is the first numbered item. We can add text to the numbered items with add_text(), just as we can add text to paragraphs.</text:p>
        </text:list-item>
        <text:list-item>
          <text:p>This is the second numbered item.</text:p>
        </text:list-item>
        <text:list-item>
          <text:p>This is the third numbered item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