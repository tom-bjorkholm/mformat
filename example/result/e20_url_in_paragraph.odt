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paragraph example</text:h>
      <text:p>This is a paragraph with a URL: <text:a xlink:href="https://github.com/tom-bjorkholm/mformat/blob/master/example" text:style-name="link">The examples are here.</text:a></text:p>
      <text:p>The URL was added as a link using add_url(text, url)</text:p>
      <text:p>By not specifying the text, the URL is shows as text: <text:a xlink:href="https://github.com/tom-bjorkholm/mformat/blob/master/example" text:style-name="link">https://github.com/tom-bjorkholm/mformat/blob/master/example</text:a></text:p>
      <text:p>A paragraph can of course have multiple URLs. <text:a xlink:href="https://github.com/tom-bjorkholm/mformat/blob/master/example/src" text:style-name="link">The source code of the examples are here.</text:a> and <text:a xlink:href="https://github.com/tom-bjorkholm/mformat/blob/master/example/result" text:style-name="link">The produced output files are here.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style:style style:family="paragraph" style:name="block-quote" style:display-name="block-quote">
      <style:paragraph-properties fo:margin-left="1.27cm" fo:margin-right="1.27cm" fo:background-color="#e8e8e8" fo:padding="0.2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1.00cm" fo:page-height="29.7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2.1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