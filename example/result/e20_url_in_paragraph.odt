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URL in paragraph example</text:h>
      <text:p>This is a paragraph with a URL: <text:a xlink:href="https://bitbucket.org/tom-bjorkholm/mformat/src/master/example" text:style-name="link">The examples are here.</text:a></text:p>
      <text:p>The URL was added as a link using add_url(text, url)</text:p>
      <text:p>By not specifying the text, the URL is shows as text: <text:a xlink:href="https://bitbucket.org/tom-bjorkholm/mformat/src/master/example" text:style-name="link">https://bitbucket.org/tom-bjorkholm/mformat/src/master/example</text:a></text:p>
      <text:p>A paragraph can of course have multiple URLs. <text:a xlink:href="https://bitbucket.org/tom-bjorkholm/mformat/src/master/example/src" text:style-name="link">The source code of the examples are here.</text:a> and <text:a xlink:href="https://bitbucket.org/tom-bjorkholm/mformat/src/master/example/result" text:style-name="link">The produced output files are here.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