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URL in numbered point list example</text:h>
      <text:list text:style-name="numbered-list">
        <text:list-item>
          <text:p>A numbered point with a URL: <text:a xlink:href="https://github.com/tom-bjorkholm/mformat/blob/master/example/src" text:style-name="link">This URL link to the examples.</text:a></text:p>
        </text:list-item>
        <text:list-item>
          <text:p>A numbered point with a bold URL: <text:a xlink:href="https://github.com/tom-bjorkholm/mformat/blob/master/example/src" text:style-name="link-bold">This bold URL link to the example source code.</text:a></text:p>
        </text:list-item>
        <text:list-item>
          <text:p>And with an italic URL: <text:a xlink:href="https://github.com/tom-bjorkholm/mformat/blob/master/example/result" text:style-name="link-italic">This italic URL link to the examples result.</text:a></text:p>
        </text:list-item>
        <text:list-item>
          <text:p>And with an italic and bold URL: <text:a xlink:href="https://github.com/tom-bjorkholm/mformat/blob/master/example/src" text:style-name="link-bold-italic">This italic and bold URL link to the examples.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text" style:name="code-text" style:display-name="code-text">
      <style:text-properties style:font-name="Liberation Mono" fo:font-family="'Liberation Mono'" style:font-family-generic="modern" style:font-pitch="fixed" style:font-name-asian="Liberation Mono" style:font-name-complex="Liberation Mono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style:style style:family="paragraph" style:name="block-quote" style:display-name="block-quote">
      <style:paragraph-properties fo:margin-left="1.27cm" fo:margin-right="1.27cm" fo:background-color="#e8e8e8" fo:padding="0.2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1.00cm" fo:page-height="29.70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2.10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