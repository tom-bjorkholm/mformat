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<text:span text:style-name="bold">With new_paragraph we can start a paragraph with the first sentence in bold.</text:span> Use add_text to add text without bold to the paragraph.<text:span text:style-name="italic"><text:s/>Use add_text to add text in italic to the paragraph.</text:span><text:span text:style-name="bold-italic"><text:s/>Use add_text to add text in bold and italic.</text:span></text:p>
      <text:p><text:span text:style-name="italic">With new_paragraph we can start a second paragraph with the first sentence in italic.</text:span> Use add_text to add text without italic to the second paragraph.<text:span text:style-name="bold"><text:s/>Use add_text to add text in bold to the second paragraph.</text:span><text:span text:style-name="bold-italic"><text:s/>Use add_text to add text in italic and bold to the second paragraph.</text:span></text:p>
      <text:p><text:span text:style-name="bold">(As this example does not have a heading the generated markdown file will not have a heading. If markdownlint is used on the generated markdown file it will report an error for the missing heading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