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paragraph with bold &amp; italic example</text:h>
      <text:p>This is a paragraph with a URL: <text:a xlink:href="https://bitbucket.org/tom-bjorkholm/mformat/src/master/example" text:style-name="link-italic">This italic URL link to the examples</text:a> and <text:a xlink:href="https://bitbucket.org/tom-bjorkholm/mformat/src/master/example/src" text:style-name="link-bold">this bold URL link to the example source cod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