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with bold &amp; italic example</text:h>
      <text:p>This is a paragraph with a URL: <text:a xlink:href="https://github.com/tom-bjorkholm/mformat/blob/master/example" text:style-name="link-italic">This italic URL link to the examples</text:a> and <text:a xlink:href="https://github.com/tom-bjorkholm/mformat/blob/master/example/src" text:style-name="link-bold">this bold URL link to the example source cod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1.00cm" fo:page-height="29.7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