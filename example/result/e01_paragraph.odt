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start_paragraph we can start a paragraph. With add_text we can add text to the paragraph. We can also add text to the paragraph in multiple calls using add_text. (As this example does not have a heading the generated markdown file will not have a heading. If markdownlint is used on the generated markdown file it will report an error for the missing heading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