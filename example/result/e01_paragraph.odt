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>With start_paragraph we can start a paragraph. With add_text we can add text to the paragraph. We can also add text to the paragraph in multiple calls using add_tex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19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