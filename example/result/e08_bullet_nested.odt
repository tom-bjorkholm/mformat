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Nested bullet list example</text:h>
      <text:list text:style-name="bullet-list">
        <text:list-item>
          <text:p>

This is the first bullet point item at level 1.</text:p>
          <text:list text:style-name="bullet-list">
            <text:list-item>
              <text:p>

This is the second bullet point item. This time at level 2.</text:p>
            </text:list-item>
            <text:list-item>
              <text:p>

Another point item without specifying level. This means that it is at the same level as the previous item.</text:p>
              <text:list text:style-name="bullet-list">
                <text:list-item>
                  <text:p>

This is a bullet point item at level 3.</text:p>
                </text:list-item>
              </text:list>
            </text:list-item>
          </text:list>
        </text:list-item>
        <text:list-item>
          <text:p>

This is final bullet point item. This time at level 1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