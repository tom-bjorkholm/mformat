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numbered-list">
        <text:list-item>
          <text:p>First item</text:p>
        </text:list-item>
        <text:list-item>
          <text:p>Second item<text:span text:style-name="bold"><text:s/>with some bold text</text:span></text:p>
          <text:list text:style-name="bullet-list">
            <text:list-item>
              <text:p>

First bullet</text:p>
            </text:list-item>
            <text:list-item>
              <text:p>

<text:span text:style-name="italic">Second bullet is italic</text:span><text:span text:style-name="bold"><text:s/>with some bold</text:span> and some non-bold and non-italic text</text:p>
              <text:list text:style-name="numbered-list">
                <text:list-item>
                  <text:p>First item in third level</text:p>
                </text:list-item>
                <text:list-item>
                  <text:p>Second item in third level</text:p>
                </text:list-item>
              </text:list>
            </text:list-item>
          </text:list>
        </text:list-item>
        <text:list-item>
          <text:p>Third item on first level. By specifying a lower level we end some nested list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