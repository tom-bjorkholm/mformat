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Bullet list with bold text example</text:h>
      <text:list text:style-name="bullet-list">
        <text:list-item>
          <text:p>

This is the first bullet point item. This is not bold or italic.<text:span text:style-name="bold"><text:s/>However, this bold text is added to it.</text:span><text:span text:style-name="italic"><text:s/>And this italic text is added to it.</text:span></text:p>
        </text:list-item>
        <text:list-item>
          <text:p>

<text:span text:style-name="bold">This is the bold bullet point item.</text:span> This non-bold text is added to it.</text:p>
        </text:list-item>
        <text:list-item>
          <text:p>

<text:span text:style-name="italic">This is the italic bullet point item.</text:span> This non-italic text is added to it.</text:p>
        </text:list-item>
        <text:list-item>
          <text:p>

<text:span text:style-name="bold-italic">This is the bold and italic bullet point item.</text:span> This non-bold and non-italic text is added to it.</text:p>
          <text:list text:style-name="bullet-list">
            <text:list-item>
              <text:p>

This is in item in a nested bullet list.<text:span text:style-name="bold"><text:s/>Bold text added to it.</text:span><text:span text:style-name="italic"><text:s/>And italic text added to it.</text:span></text:p>
            </text:list-item>
            <text:list-item>
              <text:p>

<text:span text:style-name="bold-italic">Second nested bullet point item.</text:span> This non-bold and non-italic text is added to it.<text:span text:style-name="bold"><text:s/>And bold</text:span><text:span text:style-name="italic"><text:s/>and italic text added to it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