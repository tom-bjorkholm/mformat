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ustom Format Example</text:h>
      <text:p>This example demonstrates how to create and use a custom format in the mformat framework. The same code can be used to write to different formats, just by changing the format name.</text:p>
      <text:h text:outline-level="2">Features</text:h>
      <text:list text:style-name="bullet-list">
        <text:list-item>
          <text:p>

Easy to extend the framework</text:p>
        </text:list-item>
        <text:list-item>
          <text:p>

Supports most standard document elements</text:p>
        </text:list-item>
        <text:list-item>
          <text:p>

Format-agnostic API</text:p>
        </text:list-item>
      </text:list>
      <text:list text:style-name="numbered-list">
        <text:list-item>
          <text:p>First step: Create a format class</text:p>
        </text:list-item>
        <text:list-item>
          <text:p>Second step: Implement required methods</text:p>
        </text:list-item>
        <text:list-item>
          <text:p>Third step: Register the format</text:p>
        </text:list-item>
      </text:list>
      <text:p/>
      <table:table table:name="Table1">
        <table:table-column table:number-columns-repeated="2"/>
        <table:table-row>
          <table:table-cell>
            <text:p><text:span text:style-name="bold">Element</text:span></text:p>
          </table:table-cell>
          <table:table-cell>
            <text:p><text:span text:style-name="bold">Method</text:span></text:p>
          </table:table-cell>
        </table:table-row>
        <table:table-row>
          <table:table-cell>
            <text:p>Paragraph</text:p>
          </table:table-cell>
          <table:table-cell>
            <text:p>new_paragraph()</text:p>
          </table:table-cell>
        </table:table-row>
        <table:table-row>
          <table:table-cell>
            <text:p>Heading</text:p>
          </table:table-cell>
          <table:table-cell>
            <text:p>new_heading()</text:p>
          </table:table-cell>
        </table:table-row>
        <table:table-row>
          <table:table-cell>
            <text:p>List</text:p>
          </table:table-cell>
          <table:table-cell>
            <text:p>new_bullet_item()</text:p>
          </table:table-cell>
        </table:table-row>
      </table:table>
      <text:p/>
      <text:p text:style-name="code">def example():</text:p>
      <text:p text:style-name="code"><text:s text:c="4"/>print("Hello, World!")</text:p>
      <text:p>This text is<text:span text:style-name="bold"><text:s/>bold</text:span> and this is<text:span text:style-name="italic"><text:s/>italic</text:span> .</text:p>
      <text:p>Visit <text:a xlink:href="https://example.com" text:style-name="link">our websit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