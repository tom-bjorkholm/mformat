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bullet list example</text:h>
      <text:list text:style-name="bullet-list">
        <text:list-item>
          <text:p>

This is a bullet list with a URL: <text:a xlink:href="https://github.com/tom-bjorkholm/mformat/blob/master/example/src" text:style-name="link">This URL link to the examples.</text:a></text:p>
        </text:list-item>
        <text:list-item>
          <text:p>

Another bullet point with a bold URL: <text:a xlink:href="https://github.com/tom-bjorkholm/mformat/blob/master/example/src" text:style-name="link-bold">This bold URL link to the example source code.</text:a></text:p>
        </text:list-item>
        <text:list-item>
          <text:p>

A bullet point with an italic URL: <text:a xlink:href="https://github.com/tom-bjorkholm/mformat/blob/master/example/result" text:style-name="link-italic">This italic URL link to the examples result.</text:a></text:p>
        </text:list-item>
        <text:list-item>
          <text:p>

Last point with an italic and bold URL: <text:a xlink:href="https://github.com/tom-bjorkholm/mformat/blob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1.00cm" fo:page-height="29.7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1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