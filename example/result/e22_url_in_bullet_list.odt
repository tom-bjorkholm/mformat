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bullet-list">
        <text:list-item>
          <text:p>

This is a bullet list with a URL: <text:a xlink:href="https://bitbucket.org/tom-bjorkholm/mformat/src/master/example/src" text:style-name="link">This URL link to the examples.</text:a></text:p>
        </text:list-item>
        <text:list-item>
          <text:p>

Another bullet point with a bold URL: <text:a xlink:href="https://bitbucket.org/tom-bjorkholm/mformat/src/master/example/src" text:style-name="link-bold">This bold URL link to the example source code.</text:a></text:p>
        </text:list-item>
        <text:list-item>
          <text:p>

A bullet point with an italic URL: <text:a xlink:href="https://bitbucket.org/tom-bjorkholm/mformat/src/master/example/result" text:style-name="link-italic">This italic URL link to the examples result.</text:a></text:p>
        </text:list-item>
        <text:list-item>
          <text:p>

Last point with an italic and bold URL: <text:a xlink:href="https://bitbucket.org/tom-bjorkholm/mformat/src/master/example/src" text:style-name="link-bold-italic">This italic and bold URL link to the examples.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