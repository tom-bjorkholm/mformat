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With start_paragraph we can start a paragraph. Thanks to smart whitespace handling, we do not need to add whitespace between text fragments from different calls to add_text or start_paragraph calls. If we have extra whitespace, it will be consolidated into a single space.</text:p>
      <text:p>With start_paragraph we can start another paragraph.  With smart_ws=False the whitespace between text  fragments will be preserved.So we can have no whitespae or multiple spaces between text fragments if we want to. We can at any time switch on smart whitespace handling by ommitting the smart_ws=False argument, or by explicitly setting smart_ws=True.</text:p>
      <text:p><text:span text:style-name="bold">(As this example does not have a heading the generated markdown file will not have a heading. If markdownlint is used on the generated markdown file it will report an error for the missing hea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0</meta:generator>
    <meta:document-statistic meta:table-count="0" meta:image-count="0" meta:object-count="0" meta:page-count="1" meta:paragraph-count="0" meta:word-count="0" meta:character-count="0" meta:non-whitespace-character-count="0"/>
    <dc:language>en-UK</dc:language>
  </office:meta>
</office:document-meta>
</file>