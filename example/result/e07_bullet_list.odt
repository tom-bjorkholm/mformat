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outline-level="1">Bullet list example</text:h>
      <text:list text:style-name="bullet-list">
        <text:list-item>
          <text:p>

This is the first bullet point item.</text:p>
        </text:list-item>
        <text:list-item>
          <text:p>

This is the second bullet point item. We can add text to the bullet point items with add_text(), just as we can add text to paragraphs.</text:p>
        </text:list-item>
        <text:list-item>
          <text:p>

This is the third bullet point it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text" style:name="code-text" style:display-name="code-text">
      <style:text-properties style:font-name="Liberation Mono" fo:font-family="'Liberation Mono'" style:font-family-generic="modern" style:font-pitch="fixed" style:font-name-asian="Liberation Mono" style:font-name-complex="Liberation Mono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0.2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