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Bullet list example</text:h>
      <text:list text:style-name="bullet-list">
        <text:list-item>
          <text:p>

This is the first bullet point item.</text:p>
        </text:list-item>
        <text:list-item>
          <text:p>

This is the second bullet point item. We can add text to the bullet point items with add_text(), just as we can add text to paragraphs.</text:p>
        </text:list-item>
        <text:list-item>
          <text:p>

This is the third bullet point item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