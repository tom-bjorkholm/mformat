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new_paragraph we can start a paragraph. With add_text we can add text to the paragraph. As described in the example file e01_paragraph.py.</text:p>
      <text:p>With new_paragraph we can start a second paragraph. With add_text we can add text to the second paragraph just as we did with the first paragraph.</text:p>
      <text:p>(As this example does not have a heading the generated markdown file will not have a heading. If markdownlint is used on the generated markdown file it will report an error for the missing heading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