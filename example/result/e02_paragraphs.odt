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>With start_paragraph we can start a paragraph. With add_text we can add text to the paragraph. As described in the example file e01_paragraph.py.</text:p>
      <text:p>With start_paragraph we can start a second paragraph. With add_text we can add text to the second paragraph just as we did with the first paragrap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