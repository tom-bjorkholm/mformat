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in HTML gefiltert für andere Formate</text:h>
      <text:p>Dieses Beispiel zeigt, wie Sie eine CSS-Datei für HTML gefiltert haben, so dass sie nicht für andere Formate verfügbar ist.</text:p>
      <text:p>Die CSS-Datei liegt unter example/css/ und wird per relativem Pfad eingebunden (für lokale Anzeige). Die Ausgabe ist auf Deutsch; in HTML wird lang="de" im erzeugten &lt;html&gt;-Tag gesetzt. Für ODT wird sprache auch als "de" gesetzt. Für andere Formate wird die Sprache ignorie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14.80cm" fo:page-height="21.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1.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