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his is the first heading, at level 1.</text:h>
      <text:h text:outline-level="2">This is the second heading, at level 2.</text:h>
      <text:h text:outline-level="3">This is the third heading, at level 3.</text:h>
      <text:p>We can add text to headings with add_text(), just as we can add text to paragraphs. New headings can be added at any level. The argument smart_ws is used to control how whitespace is handled in headings just as in paragraphs.</text:p>
      <text:p>start_heading() also obeys the arguments bold and italic, just as in paragraphs. However, they make less sense for headings. Explicitly setting bold or italic on a heading may not produce the expected readability, as the heading has formatting from the heading definition that is specific to the output format.</text:p>
      <text:h text:outline-level="1">The fourth heading is again at level 1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