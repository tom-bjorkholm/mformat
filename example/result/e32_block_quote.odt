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Block Quote Example</text:h>
      <text:p>Block quotes are used to highlight quoted text or to draw attention to important information.</text:p>
      <text:h text:outline-level="2">Simple Block Quote</text:h>
      <text:p text:style-name="block-quote">This is a simple block quote. Block quotes are visually distinguished from regular text with indentation and/or styling depending on the output format.</text:p>
      <text:h text:outline-level="2">Block Quote with Formatting</text:h>
      <text:p text:style-name="block-quote">Block quotes can have<text:span text:style-name="bold"><text:s/>bold</text:span> and<text:span text:style-name="italic"><text:s/>italic</text:span> text just like paragraphs.</text:p>
      <text:h text:outline-level="2">Block Quote with URL</text:h>
      <text:p text:style-name="block-quote">For more information, visit <text:a xlink:href="http://example.com" text:style-name="link">Example Website</text:a> for details.</text:p>
      <text:h text:outline-level="2">Block Quote with Code</text:h>
      <text:p text:style-name="block-quote">The function<text:span text:style-name="code-text"><text:s/>new_block_quote()</text:span> starts a new block quote, and<text:span text:style-name="code-text"><text:s/>add_text()</text:span> adds more text to it.</text:p>
      <text:p>Block quotes cannot be nested. Starting a new block quote while inside one ends the current quote and starts a fresh o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