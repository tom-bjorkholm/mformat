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Existing File Example</text:h>
      <text:p>Using the file_exists_callback in the OptArgs dictionary and passing this dictionary to the MultiFormat constructor (directly or using the create_mf function) allows us to handle an exiting file in any way we want. The default behaviour if no callback is provided is to refuse to overwrite existing fil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