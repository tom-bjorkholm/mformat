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A heading with a URL: <text:a xlink:href="https://bitbucket.org/tom-bjorkholm/mformat/src/master/example" text:style-name="link">This URL link to the examples.</text:a></text:h>
      <text:h text:outline-level="2">A heading with a bold URL: <text:a xlink:href="https://bitbucket.org/tom-bjorkholm/mformat/src/master/example/src" text:style-name="link-bold">This bold URL link to the example source code.</text:a></text:h>
      <text:h text:outline-level="2">A heading with an italic URL: <text:a xlink:href="https://bitbucket.org/tom-bjorkholm/mformat/src/master/example/result" text:style-name="link-italic">This italic URL link to the examples result.</text:a></text:h>
      <text:h text:outline-level="2">And with an italic and bold URL: <text:a xlink:href="https://bitbucket.org/tom-bjorkholm/mformat/src/master/example/src" text:style-name="link-bold-italic">This italic and bold URL link to the examples.</text:a></text:h>
      <text:p>The add_url function can be used to add a URL to a heading, as well as to paragraphs, bullet lists, and numbered point list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19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