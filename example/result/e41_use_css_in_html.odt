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CSS und Sprache in HTML</text:h>
      <text:p>Dieses Beispiel zeigt, wie Sie eine CSS-Datei und die Dokumentensprache (lang) mit mformat setzen. Übergeben Sie OptArgs mit "css_file" und "lang" an create_mf, wenn das Format HTML ist.</text:p>
      <text:p>Die CSS-Datei liegt unter example/css/ und wird per Raw-URL von Bitbucket eingebunden. Die Ausgabe ist auf Deutsch; lang="de" steht im erzeugten &lt;html&gt;-Tag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19.0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