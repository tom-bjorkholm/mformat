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Numbered list with bold text example</text:h>
      <text:list text:style-name="numbered-list">
        <text:list-item>
          <text:p>This is the first numbered point item. This is not bold or italic.<text:span text:style-name="bold"><text:s/>However, this bold text is added to it.</text:span><text:span text:style-name="italic"><text:s/>And this italic text is added to it.</text:span></text:p>
        </text:list-item>
        <text:list-item>
          <text:p><text:span text:style-name="bold">This is the bold numbered point item.</text:span> This non-bold text is added to it.</text:p>
        </text:list-item>
        <text:list-item>
          <text:p><text:span text:style-name="italic">This is the italic numbered point item.</text:span> This non-italic text is added to it.</text:p>
        </text:list-item>
        <text:list-item>
          <text:p><text:span text:style-name="bold-italic">This is the bold and italic item.</text:span> This non-bold and non-italic text is added to it.</text:p>
          <text:list text:style-name="numbered-list">
            <text:list-item>
              <text:p>This is in item in a nested numbered point list.<text:span text:style-name="bold"><text:s/>Bold text added to it.</text:span><text:span text:style-name="italic"><text:s/>And italic text added to it.</text:span></text:p>
            </text:list-item>
            <text:list-item>
              <text:p><text:span text:style-name="bold-italic">Second nested numbered point item.</text:span> This non-bold and non-italic text is added to it.<text:span text:style-name="bold"><text:s/>And bold</text:span><text:span text:style-name="italic"><text:s/>and italic text added to it.</text:span></text:p>
            </text:list-item>
          </text:list>
        </text:list-item>
        <text:list-item>
          <text:p>The final item is back at level 1. This is the final numbered point item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