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Code in heading example<text:span text:style-name="code-text"><text:s/>add_code_in_text()</text:span></text:h>
      <text:list text:style-name="bullet-list">
        <text:list-item>
          <text:p>

Bullet items can also contain code:<text:span text:style-name="code-text"><text:s/>example()</text:span></text:p>
        </text:list-item>
      </text:list>
      <text:list text:style-name="numbered-list">
        <text:list-item>
          <text:p>Numbered items can also contain code:<text:span text:style-name="code-text"><text:s/>example(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2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