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ested numbered list example</text:h>
      <text:list text:style-name="numbered-list">
        <text:list-item>
          <text:p>This is the first numbered item. If we do not specify the level, it is at the same level as the previous item - and when there is no previous item, it is at level 1.</text:p>
        </text:list-item>
        <text:list-item>
          <text:p>This is the second numbered item.</text:p>
          <text:list text:style-name="numbered-list">
            <text:list-item>
              <text:p>This is the third numbered item. This is the first item at level 2.</text:p>
            </text:list-item>
            <text:list-item>
              <text:p>Another item at level 2.</text:p>
              <text:list text:style-name="numbered-list">
                <text:list-item>
                  <text:p>And an item at level 3.</text:p>
                </text:list-item>
              </text:list>
            </text:list-item>
          </text:list>
        </text:list-item>
        <text:list-item>
          <text:p>The final item is back at level 1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